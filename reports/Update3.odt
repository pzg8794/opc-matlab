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E8000002EE2EB22E5B.jpg" manifest:media-type=""/>
  <manifest:file-entry manifest:full-path="Pictures/10000000000003E8000002EE4B4B6FBA.jpg" manifest:media-type=""/>
  <manifest:file-entry manifest:full-path="Pictures/10000000000003E8000002EE5296DEAA.jpg" manifest:media-type=""/>
  <manifest:file-entry manifest:full-path="Pictures/10000000000003E8000002EE4AD8032C.jpg" manifest:media-type=""/>
  <manifest:file-entry manifest:full-path="Pictures/10000000000003E8000002EE5CBA08BC.jpg" manifest:media-type=""/>
  <manifest:file-entry manifest:full-path="Pictures/10000000000003E8000002EE8BB60C7C.jpg" manifest:media-type=""/>
  <manifest:file-entry manifest:full-path="Pictures/10000000000003E8000002EED00697B7.jpg" manifest:media-type=""/>
  <manifest:file-entry manifest:full-path="Pictures/10000000000003E8000002EEB1CA310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나눔고딕코딩" svg:font-family="나눔고딕코딩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 style:master-page-name="Converted1">
      <style:paragraph-properties style:page-number="auto"/>
    </style:style>
    <style:style style:name="P4" style:family="paragraph" style:parent-style-name="Standard" style:master-page-name="Converted2">
      <style:paragraph-properties style:page-number="auto"/>
    </style:style>
    <style:style style:name="P5" style:family="paragraph" style:parent-style-name="Standard" style:master-page-name="Converted3">
      <style:paragraph-properties style:page-number="auto"/>
    </style:style>
    <style:style style:name="P6" style:family="paragraph" style:parent-style-name="Standard" style:master-page-name="Converted4">
      <style:paragraph-properties style:page-number="auto"/>
    </style:style>
    <style:style style:name="P7" style:family="paragraph" style:parent-style-name="Standard" style:master-page-name="Converted5">
      <style:paragraph-properties style:page-number="auto"/>
    </style:style>
    <style:style style:name="P8" style:family="paragraph" style:parent-style-name="Standard" style:master-page-name="Converted6">
      <style:paragraph-properties style:page-number="auto"/>
    </style:style>
    <style:style style:name="P9" style:family="paragraph" style:parent-style-name="Standard" style:master-page-name="Converted7">
      <style:paragraph-properties style:page-number="auto"/>
    </style:style>
    <style:style style:name="P10" style:family="paragraph" style:parent-style-name="Standard" style:master-page-name="Converted8">
      <style:paragraph-properties style:page-number="auto"/>
    </style:style>
    <style:style style:name="P11" style:family="paragraph" style:parent-style-name="Standard" style:master-page-name="Converted9">
      <style:paragraph-properties style:page-number="auto"/>
    </style:style>
    <style:style style:name="P12" style:family="paragraph" style:parent-style-name="Standard" style:master-page-name="Converted10">
      <style:paragraph-properties style:page-number="auto"/>
    </style:style>
    <style:style style:name="P13" style:family="paragraph" style:parent-style-name="Standard" style:master-page-name="Converted11">
      <style:paragraph-properties style:page-number="auto"/>
    </style:style>
    <style:style style:name="P14" style:family="paragraph" style:parent-style-name="Standard" style:master-page-name="Converted12">
      <style:paragraph-properties style:page-number="auto"/>
    </style:style>
    <style:style style:name="P15" style:family="paragraph" style:parent-style-name="Standard" style:master-page-name="Converted13">
      <style:paragraph-properties style:page-number="auto"/>
    </style:style>
    <style:style style:name="P16" style:family="paragraph" style:parent-style-name="Standard" style:master-page-name="Converted14">
      <style:paragraph-properties style:page-number="auto"/>
    </style:style>
    <style:style style:name="P17" style:family="paragraph" style:parent-style-name="Standard" style:master-page-name="Converted15">
      <style:paragraph-properties style:page-number="auto"/>
    </style:style>
    <style:style style:name="P18" style:family="paragraph" style:parent-style-name="Standard" style:master-page-name="Converted16">
      <style:paragraph-properties style:page-number="auto"/>
    </style:style>
    <style:style style:name="P19" style:family="paragraph" style:parent-style-name="Standard" style:master-page-name="Converted17">
      <style:paragraph-properties style:page-number="auto"/>
    </style:style>
    <style:style style:name="P20" style:family="paragraph" style:parent-style-name="Standard" style:master-page-name="Converted18">
      <style:paragraph-properties style:page-number="auto"/>
    </style:style>
    <style:style style:name="P21" style:family="paragraph" style:parent-style-name="Standard" style:master-page-name="Converted19">
      <style:paragraph-properties style:page-number="auto"/>
    </style:style>
    <style:style style:name="P22" style:family="paragraph" style:parent-style-name="Standard" style:master-page-name="Converted20">
      <style:paragraph-properties style:page-number="auto"/>
    </style:style>
    <style:style style:name="P23" style:family="paragraph" style:parent-style-name="Standard" style:master-page-name="Converted21">
      <style:paragraph-properties style:page-number="auto"/>
    </style:style>
    <style:style style:name="P24" style:family="paragraph" style:parent-style-name="Standard" style:master-page-name="Converted22">
      <style:paragraph-properties style:page-number="auto"/>
    </style:style>
    <style:style style:name="P25" style:family="paragraph" style:parent-style-name="Standard" style:master-page-name="Converted23">
      <style:paragraph-properties style:page-number="auto"/>
    </style:style>
    <style:style style:name="P26" style:family="paragraph" style:parent-style-name="Standard" style:master-page-name="Converted24">
      <style:paragraph-properties style:page-number="auto"/>
    </style:style>
    <style:style style:name="P27" style:family="paragraph" style:parent-style-name="Standard" style:master-page-name="Converted25">
      <style:paragraph-properties style:page-number="auto"/>
    </style:style>
    <style:style style:name="P28" style:family="paragraph" style:parent-style-name="Standard" style:master-page-name="Converted26">
      <style:paragraph-properties style:page-number="auto"/>
    </style:style>
    <style:style style:name="P29" style:family="paragraph" style:parent-style-name="Standard" style:master-page-name="Converted27">
      <style:paragraph-properties style:page-number="auto"/>
    </style:style>
    <style:style style:name="P30" style:family="paragraph" style:parent-style-name="Standard" style:master-page-name="Converted28">
      <style:paragraph-properties style:page-number="auto"/>
    </style:style>
    <style:style style:name="P31" style:family="paragraph" style:parent-style-name="Standard" style:master-page-name="Converted29">
      <style:paragraph-properties style:page-number="auto"/>
    </style:style>
    <style:style style:name="P32" style:family="paragraph" style:parent-style-name="Standard" style:master-page-name="Converted30">
      <style:paragraph-properties style:page-number="auto"/>
    </style:style>
    <style:style style:name="P33" style:family="paragraph" style:parent-style-name="Standard" style:master-page-name="Converted31">
      <style:paragraph-properties style:page-number="auto"/>
    </style:style>
    <style:style style:name="P34" style:family="paragraph" style:parent-style-name="Standard" style:master-page-name="Converted32">
      <style:paragraph-properties style:page-number="auto"/>
    </style:style>
    <style:style style:name="P35" style:family="paragraph" style:parent-style-name="Standard" style:master-page-name="Converted33">
      <style:paragraph-properties style:page-number="auto"/>
    </style:style>
    <style:style style:name="T1" style:family="text">
      <style:text-properties fo:color="#af261b" style:text-line-through-style="none" fo:font-size="44pt" fo:letter-spacing="normal" fo:font-style="normal" fo:font-weight="normal" style:letter-kerning="false" style:font-size-asian="44pt" style:font-style-asian="normal" style:font-weight-asian="normal"/>
    </style:style>
    <style:style style:name="T2" style:family="text">
      <style:text-properties fo:color="#af261b" style:text-line-through-style="none" fo:font-size="26.5pt" fo:letter-spacing="normal" fo:font-style="normal" fo:font-weight="normal" style:letter-kerning="false" style:font-size-asian="26.5pt" style:font-style-asian="normal" style:font-weight-asian="normal"/>
    </style:style>
    <style:style style:name="T3" style:family="text">
      <style:text-properties fo:color="#5c7271" style:text-line-through-style="none" fo:font-size="22pt" fo:letter-spacing="normal" fo:font-style="normal" fo:font-weight="normal" style:letter-kerning="false" style:font-size-asian="22pt" style:font-style-asian="normal" style:font-weight-asian="normal"/>
    </style:style>
    <style:style style:name="T4" style:family="text">
      <style:text-properties fo:color="#a54c78" style:text-line-through-style="none" fo:font-size="35.5pt" fo:letter-spacing="normal" fo:font-style="normal" fo:font-weight="normal" style:letter-kerning="false" style:font-size-asian="35.5pt" style:font-style-asian="normal" style:font-weight-asian="normal"/>
    </style:style>
    <style:style style:name="T5" style:family="text">
      <style:text-properties fo:color="#a54c78" style:text-line-through-style="none" fo:font-size="10.5pt" fo:letter-spacing="normal" fo:font-style="normal" fo:font-weight="normal" style:letter-kerning="false" style:font-size-asian="10.5pt" style:font-style-asian="normal" style:font-weight-asian="normal"/>
    </style:style>
    <style:style style:name="T6" style:family="text">
      <style:text-properties fo:color="#bf964c" style:text-line-through-style="none" fo:font-size="35.5pt" fo:letter-spacing="normal" fo:font-style="normal" fo:font-weight="normal" style:letter-kerning="false" style:font-size-asian="35.5pt" style:font-style-asian="normal" style:font-weight-asian="normal"/>
    </style:style>
    <style:style style:name="T7" style:family="text">
      <style:text-properties fo:color="#bf964c" style:text-line-through-style="none" fo:font-size="26.5pt" fo:letter-spacing="normal" fo:font-style="normal" fo:font-weight="normal" style:letter-kerning="false" style:font-size-asian="26.5pt" style:font-style-asian="normal" style:font-weight-asian="normal"/>
    </style:style>
    <style:style style:name="T8" style:family="text">
      <style:text-properties fo:color="#bf964c" style:text-line-through-style="none" fo:font-size="31pt" fo:letter-spacing="normal" fo:font-style="normal" fo:font-weight="normal" style:letter-kerning="false" style:font-size-asian="31pt" style:font-style-asian="normal" style:font-weight-asian="normal"/>
    </style:style>
    <style:style style:name="T9" style:family="text">
      <style:text-properties fo:color="#bf964c" style:text-line-through-style="none" fo:font-size="22pt" fo:letter-spacing="normal" fo:font-style="normal" fo:font-weight="normal" style:letter-kerning="false" style:font-size-asian="22pt" style:font-style-asian="normal" style:font-weight-asian="normal"/>
    </style:style>
    <style:style style:name="T10" style:family="text">
      <style:text-properties fo:color="#bf964c" style:text-line-through-style="none" fo:font-size="32.5pt" fo:letter-spacing="normal" fo:font-style="normal" fo:font-weight="normal" style:letter-kerning="false" style:font-size-asian="32.5pt" style:font-style-asian="normal" style:font-weight-asian="normal"/>
    </style:style>
    <style:style style:name="T11" style:family="text">
      <style:text-properties fo:color="#000000" style:text-line-through-style="none" fo:font-size="13pt" fo:letter-spacing="normal" fo:font-style="normal" fo:font-weight="normal" style:letter-kerning="false" style:font-size-asian="13pt" style:font-style-asian="normal" style:font-weight-asian="normal"/>
    </style:style>
    <style:style style:name="T12" style:family="text">
      <style:text-properties fo:color="#000000" style:text-line-through-style="none" fo:font-size="12pt" fo:letter-spacing="normal" fo:font-style="normal" fo:font-weight="normal" style:letter-kerning="false" style:font-size-asian="12pt" style:font-style-asian="normal" style:font-weight-asian="normal"/>
    </style:style>
    <style:style style:name="T13" style:family="text">
      <style:text-properties fo:color="#000000" style:text-line-through-style="none" fo:font-size="9pt" fo:letter-spacing="normal" fo:font-style="normal" fo:font-weight="normal" style:letter-kerning="false" style:font-size-asian="9pt" style:font-style-asian="normal" style:font-weight-asian="normal"/>
    </style:style>
    <style:style style:name="T14" style:family="text">
      <style:text-properties fo:color="#000000" style:text-line-through-style="none" fo:font-size="10.5pt" fo:letter-spacing="normal" fo:font-style="normal" fo:font-weight="normal" style:letter-kerning="false" style:font-size-asian="10.5pt" style:font-style-asian="normal" style:font-weight-asian="normal"/>
    </style:style>
    <style:style style:name="T15" style:family="text">
      <style:text-properties fo:color="#000000" style:text-line-through-style="none" fo:font-size="17.5pt" fo:letter-spacing="normal" fo:font-style="normal" fo:font-weight="normal" style:letter-kerning="false" style:font-size-asian="17.5pt" style:font-style-asian="normal" style:font-weight-asian="normal"/>
    </style:style>
    <style:style style:name="T16" style:family="text">
      <style:text-properties fo:color="#000000" style:text-line-through-style="none" fo:font-size="14.5pt" fo:letter-spacing="normal" fo:font-style="normal" fo:font-weight="normal" style:letter-kerning="false" style:font-size-asian="14.5pt" style:font-style-asian="normal" style:font-weight-asian="normal"/>
    </style:style>
    <style:style style:name="T17" style:family="text">
      <style:text-properties fo:color="#cb0000" style:text-line-through-style="none" fo:font-size="10.5pt" fo:letter-spacing="normal" fo:font-style="normal" fo:font-weight="normal" style:letter-kerning="false" style:font-size-asian="10.5pt" style:font-style-asian="normal" style:font-weight-asian="normal"/>
    </style:style>
    <style:style style:name="T18" style:family="text">
      <style:text-properties fo:color="#b82b00" style:text-line-through-style="none" fo:font-size="10.5pt" fo:letter-spacing="normal" fo:font-style="normal" fo:font-weight="normal" style:letter-kerning="false" style:font-size-asian="10.5pt" style:font-style-asian="normal" style:font-weight-asian="normal"/>
    </style:style>
    <style:style style:name="fr1" style:family="graphic" style:parent-style-name="Frame">
      <style:graphic-properties fo:margin-left="0in" fo:margin-right="0in" fo:margin-top="0in" fo:margin-bottom="0in" style:vertical-pos="from-top" style:vertical-rel="page-content" style:horizontal-pos="from-left" style:horizontal-rel="page-content" fo:padding="0in" fo:border="none"/>
    </style:style>
    <style:style style:name="fr2" style:family="graphic" style:parent-style-name="Graphics">
      <style:graphic-properties fo:margin-left="0.1256in" fo:margin-right="0.1256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2" text:anchor-type="paragraph" svg:x="1.652in" svg:y="3.4118in" svg:width="2.7709in" draw:z-index="1"><draw:text-box fo:min-height="0in"><text:p text:style-name="P1"><text:span text:style-name="T3">Karina Damico</text:span></text:p><text:p text:style-name="P1"><text:span text:style-name="T3">Pauline Martial</text:span></text:p><text:p text:style-name="P1"><text:span text:style-name="T3">Piter Garcia</text:span></text:p></draw:text-box></draw:frame><draw:frame draw:style-name="fr1" draw:name="Frame1" text:anchor-type="paragraph" svg:x="0.4252in" svg:y="0.728in" svg:width="5.5835in" draw:z-index="0"><draw:text-box fo:min-height="0in"><text:p text:style-name="P1"><text:span text:style-name="T1">Scene Classification</text:span></text:p><text:p text:style-name="P1"><text:span text:style-name="T1">Update 3</text:span></text:p></draw:text-box></draw:frame></text:p>
      <text:p text:style-name="P3"><draw:frame draw:style-name="fr1" draw:name="Frame3" text:anchor-type="paragraph" svg:x="2.1335in" svg:y="2.3201in" svg:width="4.6327in" draw:z-index="2"><draw:text-box fo:min-height="0in"><text:p text:style-name="P1"><text:span text:style-name="T4"><text:s text:c="4"/>Karina:</text:span></text:p><text:p text:style-name="P1"><text:span text:style-name="T6">Gabor descriptor</text:span></text:p></draw:text-box></draw:frame></text:p>
      <text:p text:style-name="P4"><draw:frame draw:style-name="fr1" draw:name="Frame12" text:anchor-type="paragraph" svg:x="1.061in" svg:y="5.0937in" svg:width="3.0425in" draw:z-index="11"><draw:text-box fo:min-height="0in"><text:p text:style-name="P1"><text:span text:style-name="T11">Number of output neurons: 5</text:span></text:p></draw:text-box></draw:frame><draw:frame draw:style-name="fr1" draw:name="Frame4" text:anchor-type="paragraph" svg:x="0.4902in" svg:y="0.7937in" svg:width="3.7571in" draw:z-index="3"><draw:text-box fo:min-height="0in"><text:p text:style-name="P1"><text:span text:style-name="T2">Gabor descriptor</text:span></text:p></draw:text-box></draw:frame><draw:frame draw:style-name="fr1" draw:name="Frame5" text:anchor-type="paragraph" svg:x="1.061in" svg:y="1.5291in" svg:width="5.878in" draw:z-index="4"><draw:text-box fo:min-height="0in"><text:p text:style-name="P1"><text:span text:style-name="T11">Test on 4 line histogram methods [2] - 1x128 feature vector:</text:span></text:p></draw:text-box></draw:frame><draw:frame draw:style-name="fr1" draw:name="Frame6" text:anchor-type="paragraph" svg:x="1.061in" svg:y="2.0043in" svg:width="3.9146in" draw:z-index="5"><draw:text-box fo:min-height="0in"><text:p text:style-name="P1"><text:span text:style-name="T11">Create training input matrix: 128 x 345</text:span></text:p></draw:text-box></draw:frame><draw:frame draw:style-name="fr1" draw:name="Frame7" text:anchor-type="paragraph" svg:x="1.061in" svg:y="2.4799in" svg:width="5.6366in" draw:z-index="6"><draw:text-box fo:min-height="0in"><text:p text:style-name="P1"><text:span text:style-name="T11">Create target matrix: 5 x 345 (5 categories, 345 samples)</text:span></text:p></draw:text-box></draw:frame><draw:frame draw:style-name="fr1" draw:name="Frame8" text:anchor-type="paragraph" svg:x="1.061in" svg:y="2.9547in" svg:width="3.5701in" draw:z-index="7"><draw:text-box fo:min-height="0in"><text:p text:style-name="P1"><text:span text:style-name="T11">Create NN with Matlab NN toolbox</text:span></text:p></draw:text-box></draw:frame><draw:frame draw:style-name="fr1" draw:name="Frame9" text:anchor-type="paragraph" svg:x="1.061in" svg:y="3.4307in" svg:width="6.9453in" draw:z-index="8"><draw:text-box fo:min-height="0in"><text:p text:style-name="P1"><text:span text:style-name="T11">Split those training images into: training (70%), validation (15%), testing</text:span></text:p><text:p text:style-name="P1"><text:span text:style-name="T11">(15%)</text:span></text:p></draw:text-box></draw:frame><draw:frame draw:style-name="fr1" draw:name="Frame10" text:anchor-type="paragraph" svg:x="1.061in" svg:y="4.1429in" svg:width="4.948in" draw:z-index="9"><draw:text-box fo:min-height="0in"><text:p text:style-name="P1"><text:span text:style-name="T11">As vector has length 128 - thus, 128 input vectors</text:span></text:p></draw:text-box></draw:frame><draw:frame draw:style-name="fr1" draw:name="Frame11" text:anchor-type="paragraph" svg:x="1.061in" svg:y="4.6189in" svg:width="4.1571in" draw:z-index="10"><draw:text-box fo:min-height="0in"><text:p text:style-name="P1"><text:span text:style-name="T11">Number of hidden nodes: 70 (worked ok)</text:span></text:p></draw:text-box></draw:frame></text:p>
      <text:p text:style-name="P5"><draw:frame draw:style-name="fr1" draw:name="Frame14" text:anchor-type="paragraph" svg:x="0.6783in" svg:y="1.3957in" svg:width="6.6583in" draw:z-index="13"><draw:text-box fo:min-height="0in"><text:p text:style-name="P1"><text:span text:style-name="T11">Test on 4 line hist method: trained - 67% accuracy for testing portion</text:span></text:p></draw:text-box></draw:frame><draw:frame draw:style-name="fr1" draw:name="Frame13" text:anchor-type="paragraph" svg:x="0.4902in" svg:y="0.7937in" svg:width="3.7571in" draw:z-index="12"><draw:text-box fo:min-height="0in"><text:p text:style-name="P1"><text:span text:style-name="T2">Gabor descriptor</text:span></text:p></draw:text-box></draw:frame></text:p>
      <text:p text:style-name="P6"><draw:frame draw:style-name="fr1" draw:name="Frame39" text:anchor-type="paragraph" svg:x="4.7937in" svg:y="5.6516in" svg:width="0.5661in" draw:z-index="38"><draw:text-box fo:min-height="0in"><text:p text:style-name="P1"><text:span text:style-name="T13">16</text:span></text:p></draw:text-box></draw:frame><draw:frame draw:style-name="fr1" draw:name="Frame15" text:anchor-type="paragraph" svg:x="0.4902in" svg:y="0.7937in" svg:width="3.7571in" draw:z-index="14"><draw:text-box fo:min-height="0in"><text:p text:style-name="P1"><text:span text:style-name="T2">Gabor descriptor</text:span></text:p></draw:text-box></draw:frame><draw:frame draw:style-name="fr1" draw:name="Frame16" text:anchor-type="paragraph" svg:x="0.6236in" svg:y="1.6193in" svg:width="2.6681in" draw:z-index="15"><draw:text-box fo:min-height="0in"><text:p text:style-name="P1"><text:span text:style-name="T12">Testing on 150 test images:</text:span></text:p></draw:text-box></draw:frame><draw:frame draw:style-name="fr1" draw:name="Frame17" text:anchor-type="paragraph" svg:x="0.6236in" svg:y="2.0425in" svg:width="3.4744in" draw:z-index="16"><draw:text-box fo:min-height="0in"><text:p text:style-name="P1"><text:span text:style-name="T12">Number of misclassification: 72/150 -</text:span></text:p><text:p text:style-name="P1"><text:span text:style-name="T12">52% accuracy</text:span></text:p></draw:text-box></draw:frame><draw:frame draw:style-name="fr1" draw:name="Frame18" text:anchor-type="paragraph" svg:x="0.6236in" svg:y="2.6764in" svg:width="3.7717in" draw:z-index="17"><draw:text-box fo:min-height="0in"><text:p text:style-name="P1"><text:span text:style-name="T12">Where confusion happened - everywhere</text:span></text:p><text:p text:style-name="P1"><text:span text:style-name="T12">(more or less)</text:span></text:p></draw:text-box></draw:frame><draw:frame draw:style-name="fr1" draw:name="Frame19" text:anchor-type="paragraph" svg:x="1.8909in" svg:y="3.9717in" svg:width="0.7728in" draw:z-index="18"><draw:text-box fo:min-height="0in"><text:p text:style-name="P1"><text:span text:style-name="T13">Coast</text:span></text:p></draw:text-box></draw:frame><draw:frame draw:style-name="fr1" draw:name="Frame20" text:anchor-type="paragraph" svg:x="0.9583in" svg:y="4.3354in" svg:width="0.7728in" draw:z-index="19"><draw:text-box fo:min-height="0in"><text:p text:style-name="P1"><text:span text:style-name="T13">Coast</text:span></text:p></draw:text-box></draw:frame><draw:frame draw:style-name="fr1" draw:name="Frame21" text:anchor-type="paragraph" svg:x="0.9429in" svg:y="4.6646in" svg:width="0.8035in" draw:z-index="20"><draw:text-box fo:min-height="0in"><text:p text:style-name="P1"><text:span text:style-name="T13">Forest</text:span></text:p></draw:text-box></draw:frame><draw:frame draw:style-name="fr1" draw:name="Frame22" text:anchor-type="paragraph" svg:x="0.8736in" svg:y="4.9937in" svg:width="0.9417in" draw:z-index="21"><draw:text-box fo:min-height="0in"><text:p text:style-name="P1"><text:span text:style-name="T13">Highway</text:span></text:p></draw:text-box></draw:frame><draw:frame draw:style-name="fr1" draw:name="Frame23" text:anchor-type="paragraph" svg:x="0.8547in" svg:y="5.3228in" svg:width="0.9799in" draw:z-index="22"><draw:text-box fo:min-height="0in"><text:p text:style-name="P1"><text:span text:style-name="T13">Mountain</text:span></text:p></draw:text-box></draw:frame><draw:frame draw:style-name="fr1" draw:name="Frame24" text:anchor-type="paragraph" svg:x="0.7626in" svg:y="5.6516in" svg:width="1.1634in" draw:z-index="23"><draw:text-box fo:min-height="0in"><text:p text:style-name="P1"><text:span text:style-name="T13">Tall Building</text:span></text:p></draw:text-box></draw:frame><draw:frame draw:style-name="fr1" draw:name="Frame25" text:anchor-type="paragraph" svg:x="2.0327in" svg:y="4.6646in" svg:width="0.4898in" draw:z-index="24"><draw:text-box fo:min-height="0in"><text:p text:style-name="P1"><text:span text:style-name="T13">8</text:span></text:p></draw:text-box></draw:frame><draw:frame draw:style-name="fr1" draw:name="Frame26" text:anchor-type="paragraph" svg:x="2.0327in" svg:y="4.9937in" svg:width="0.4898in" draw:z-index="25"><draw:text-box fo:min-height="0in"><text:p text:style-name="P1"><text:span text:style-name="T13">7</text:span></text:p></draw:text-box></draw:frame><draw:frame draw:style-name="fr1" draw:name="Frame27" text:anchor-type="paragraph" svg:x="2.0327in" svg:y="5.3228in" svg:width="0.4898in" draw:z-index="26"><draw:text-box fo:min-height="0in"><text:p text:style-name="P1"><text:span text:style-name="T13">7</text:span></text:p></draw:text-box></draw:frame><draw:frame draw:style-name="fr1" draw:name="Frame28" text:anchor-type="paragraph" svg:x="1.9945in" svg:y="5.6516in" svg:width="0.5661in" draw:z-index="27"><draw:text-box fo:min-height="0in"><text:p text:style-name="P1"><text:span text:style-name="T13">10</text:span></text:p></draw:text-box></draw:frame><draw:frame draw:style-name="fr1" draw:name="Frame29" text:anchor-type="paragraph" svg:x="2.8091in" svg:y="3.9717in" svg:width="0.8035in" draw:z-index="28"><draw:text-box fo:min-height="0in"><text:p text:style-name="P1"><text:span text:style-name="T13">Forest</text:span></text:p></draw:text-box></draw:frame><draw:frame draw:style-name="fr1" draw:name="Frame30" text:anchor-type="paragraph" svg:x="3.6736in" svg:y="3.9717in" svg:width="0.9417in" draw:z-index="29"><draw:text-box fo:min-height="0in"><text:p text:style-name="P1"><text:span text:style-name="T13">Highway</text:span></text:p></draw:text-box></draw:frame><draw:frame draw:style-name="fr1" draw:name="Frame31" text:anchor-type="paragraph" svg:x="4.5874in" svg:y="3.9717in" svg:width="0.9799in" draw:z-index="30"><draw:text-box fo:min-height="0in"><text:p text:style-name="P1"><text:span text:style-name="T13">Mountain</text:span></text:p></draw:text-box></draw:frame><draw:frame draw:style-name="fr1" draw:name="Frame32" text:anchor-type="paragraph" svg:x="5.4283in" svg:y="3.9717in" svg:width="1.1634in" draw:z-index="31"><draw:text-box fo:min-height="0in"><text:p text:style-name="P1"><text:span text:style-name="T13">Tall Building</text:span></text:p></draw:text-box></draw:frame><draw:frame draw:style-name="fr1" draw:name="Frame33" text:anchor-type="paragraph" svg:x="6.7429in" svg:y="4.3146in" svg:width="1.0673in" draw:z-index="32"><draw:text-box fo:min-height="0in"><text:p text:style-name="P1"><text:span text:style-name="T11">BAD!!!</text:span></text:p></draw:text-box></draw:frame><draw:frame draw:style-name="fr1" draw:name="Frame34" text:anchor-type="paragraph" svg:x="2.9661in" svg:y="4.9937in" svg:width="0.4898in" draw:z-index="33"><draw:text-box fo:min-height="0in"><text:p text:style-name="P1"><text:span text:style-name="T13">5</text:span></text:p></draw:text-box></draw:frame><draw:frame draw:style-name="fr1" draw:name="Frame35" text:anchor-type="paragraph" svg:x="2.9661in" svg:y="5.3228in" svg:width="0.4898in" draw:z-index="34"><draw:text-box fo:min-height="0in"><text:p text:style-name="P1"><text:span text:style-name="T13">3</text:span></text:p></draw:text-box></draw:frame><draw:frame draw:style-name="fr1" draw:name="Frame36" text:anchor-type="paragraph" svg:x="2.9661in" svg:y="5.6516in" svg:width="0.4898in" draw:z-index="35"><draw:text-box fo:min-height="0in"><text:p text:style-name="P1"><text:span text:style-name="T13">6</text:span></text:p></draw:text-box></draw:frame><draw:frame draw:style-name="fr1" draw:name="Frame37" text:anchor-type="paragraph" svg:x="3.8992in" svg:y="5.3228in" svg:width="0.4898in" draw:z-index="36"><draw:text-box fo:min-height="0in"><text:p text:style-name="P1"><text:span text:style-name="T13">5</text:span></text:p></draw:text-box></draw:frame><draw:frame draw:style-name="fr1" draw:name="Frame38" text:anchor-type="paragraph" svg:x="3.8992in" svg:y="5.6516in" svg:width="0.4898in" draw:z-index="37"><draw:text-box fo:min-height="0in"><text:p text:style-name="P1"><text:span text:style-name="T13">5</text:span></text:p></draw:text-box></draw:frame></text:p>
      <text:p text:style-name="P7"><draw:frame draw:style-name="fr1" draw:name="Frame45" text:anchor-type="paragraph" svg:x="1.9382in" svg:y="4.3102in" svg:width="1.0673in" draw:z-index="44"><draw:text-box fo:min-height="0in"><text:p text:style-name="P1"><text:span text:style-name="T11">BAD!!!</text:span></text:p></draw:text-box></draw:frame><draw:frame draw:style-name="fr1" draw:name="Frame40" text:anchor-type="paragraph" svg:x="0.4902in" svg:y="0.7937in" svg:width="3.7571in" draw:z-index="39"><draw:text-box fo:min-height="0in"><text:p text:style-name="P1"><text:span text:style-name="T2">Gabor descriptor</text:span></text:p></draw:text-box></draw:frame><draw:frame draw:style-name="fr1" draw:name="Frame41" text:anchor-type="paragraph" svg:x="0.6783in" svg:y="1.3957in" svg:width="3.789in" draw:z-index="40"><draw:text-box fo:min-height="0in"><text:p text:style-name="P1"><text:span text:style-name="T11">Test on 4 line manual collon method:</text:span></text:p></draw:text-box></draw:frame><draw:frame draw:style-name="fr1" draw:name="Frame42" text:anchor-type="paragraph" svg:x="0.6783in" svg:y="2.2728in" svg:width="2.6681in" draw:z-index="41"><draw:text-box fo:min-height="0in"><text:p text:style-name="P1"><text:span text:style-name="T12">Testing on 150 test images:</text:span></text:p></draw:text-box></draw:frame><draw:frame draw:style-name="fr1" draw:name="Frame43" text:anchor-type="paragraph" svg:x="0.6783in" svg:y="2.6957in" svg:width="3.8929in" draw:z-index="42"><draw:text-box fo:min-height="0in"><text:p text:style-name="P1"><text:span text:style-name="T12">Number of misclassification: 76/150 - 50%</text:span></text:p><text:p text:style-name="P1"><text:span text:style-name="T12">accuracy</text:span></text:p></draw:text-box></draw:frame><draw:frame draw:style-name="fr1" draw:name="Frame44" text:anchor-type="paragraph" svg:x="0.6783in" svg:y="3.3291in" svg:width="3.7717in" draw:z-index="43"><draw:text-box fo:min-height="0in"><text:p text:style-name="P1"><text:span text:style-name="T12">Where confusion happened - everywhere</text:span></text:p><text:p text:style-name="P1"><text:span text:style-name="T12">again (more or less)</text:span></text:p></draw:text-box></draw:frame></text:p>
      <text:p text:style-name="P8"><draw:frame draw:style-name="fr1" draw:name="Frame52" text:anchor-type="paragraph" svg:x="1.3874in" svg:y="4.9547in" svg:width="5.5457in" draw:z-index="51"><draw:text-box fo:min-height="0in"><text:p text:style-name="P1"><text:span text:style-name="T11">Network is modified: 576 input nodes, 300 hidden layers</text:span></text:p></draw:text-box></draw:frame><draw:frame draw:style-name="fr1" draw:name="Frame46" text:anchor-type="paragraph" svg:x="0.4902in" svg:y="0.7937in" svg:width="3.7571in" draw:z-index="45"><draw:text-box fo:min-height="0in"><text:p text:style-name="P1"><text:span text:style-name="T2">Gabor descriptor</text:span></text:p></draw:text-box></draw:frame><draw:frame draw:style-name="fr1" draw:name="Frame47" text:anchor-type="paragraph" svg:x="0.961in" svg:y="1.4492in" svg:width="5.8929in" draw:z-index="46"><draw:text-box fo:min-height="0in"><text:p text:style-name="P1"><text:span text:style-name="T12">GIST: as someone could remember from previous Update - 1 x 576</text:span></text:p><text:p text:style-name="P1"><text:span text:style-name="T12">feature vector.</text:span></text:p></draw:text-box></draw:frame><draw:frame draw:style-name="fr1" draw:name="Frame48" text:anchor-type="paragraph" svg:x="0.961in" svg:y="2.0835in" svg:width="5.8839in" draw:z-index="47"><draw:text-box fo:min-height="0in"><text:p text:style-name="P1"><text:span text:style-name="T12">But I found a nice article describing how someone applied gabor on</text:span></text:p><text:p text:style-name="P1"><text:span text:style-name="T12">colored image, that needs to be preprocessed first, so:</text:span></text:p></draw:text-box></draw:frame><draw:frame draw:style-name="fr1" draw:name="Frame49" text:anchor-type="paragraph" svg:x="0.961in" svg:y="2.7165in" svg:width="5.9339in" draw:z-index="48"><draw:text-box fo:min-height="0in"><text:p text:style-name="P1"><text:span text:style-name="T12">1) Whitening the image (through difference of image and real part of</text:span></text:p><text:p text:style-name="P1"><text:span text:style-name="T12">double Fourier Transformed Image) - use fft2()</text:span></text:p></draw:text-box></draw:frame><draw:frame draw:style-name="fr1" draw:name="Frame50" text:anchor-type="paragraph" svg:x="0.961in" svg:y="3.3508in" svg:width="6.2307in" draw:z-index="49"><draw:text-box fo:min-height="0in"><text:p text:style-name="P1"><text:span text:style-name="T12">2) Local contrast normalization (normalization is done by dividing by the</text:span></text:p><text:p text:style-name="P1"><text:span text:style-name="T12">local luminance variance)</text:span></text:p></draw:text-box></draw:frame><draw:frame draw:style-name="fr1" draw:name="Frame51" text:anchor-type="paragraph" svg:x="0.961in" svg:y="3.9846in" svg:width="6.0063in" draw:z-index="50"><draw:text-box fo:min-height="0in"><text:p text:style-name="P1"><text:span text:style-name="T12">3) When calculating Gabor for colored - need to reshape, so that one</text:span></text:p><text:p text:style-name="P1"><text:span text:style-name="T12">column is one images output</text:span></text:p></draw:text-box></draw:frame></text:p>
      <text:p text:style-name="P9"><draw:frame draw:style-name="fr1" draw:name="Frame53" text:anchor-type="paragraph" svg:x="0.4902in" svg:y="0.7937in" svg:width="3.7571in" draw:z-index="52"><draw:text-box fo:min-height="0in"><text:p text:style-name="P1"><text:span text:style-name="T2">Gabor descriptor</text:span></text:p></draw:text-box></draw:frame></text:p>
      <text:p text:style-name="P10"><draw:frame draw:style-name="fr1" draw:name="Frame56" text:anchor-type="paragraph" svg:x="1.1283in" svg:y="5.6909in" svg:width="2.4445in" draw:z-index="55"><draw:text-box fo:min-height="0in"><text:p text:style-name="P1"><text:span text:style-name="T11">OMG! Looks nice!!! :D</text:span></text:p></draw:text-box></draw:frame><draw:frame draw:style-name="fr1" draw:name="Frame54" text:anchor-type="paragraph" svg:x="0.4902in" svg:y="0.7937in" svg:width="3.7571in" draw:z-index="53"><draw:text-box fo:min-height="0in"><text:p text:style-name="P1"><text:span text:style-name="T2">Gabor descriptor</text:span></text:p></draw:text-box></draw:frame><draw:frame draw:style-name="fr1" draw:name="Frame55" text:anchor-type="paragraph" svg:x="5.0547in" svg:y="1.3874in" svg:width="2.698in" draw:z-index="54"><draw:text-box fo:min-height="0in"><text:p text:style-name="P1"><text:span text:style-name="T5">94% accuracy for training and</text:span></text:p><text:p text:style-name="P1"><text:span text:style-name="T5"><text:s text:c="8"/>validation!!!</text:span></text:p></draw:text-box></draw:frame></text:p>
      <text:p text:style-name="P11"><draw:frame draw:style-name="fr1" draw:name="Frame61" text:anchor-type="paragraph" svg:x="4.7402in" svg:y="4.2016in" svg:width="3.5382in" draw:z-index="60"><draw:text-box fo:min-height="0in"><text:p text:style-name="P1"><text:span text:style-name="T14">Which class was the most problematic one?</text:span></text:p><text:p text:style-name="P1"><text:span text:style-name="T14">- highway</text:span></text:p></draw:text-box></draw:frame><draw:frame draw:style-name="fr1" draw:name="Frame57" text:anchor-type="paragraph" svg:x="0.4902in" svg:y="0.7937in" svg:width="3.7571in" draw:z-index="56"><draw:text-box fo:min-height="0in"><text:p text:style-name="P1"><text:span text:style-name="T2">Gabor descriptor</text:span></text:p></draw:text-box></draw:frame><draw:frame draw:style-name="fr1" draw:name="Frame58" text:anchor-type="paragraph" svg:x="4.7402in" svg:y="1.9839in" svg:width="3.4311in" draw:z-index="57"><draw:text-box fo:min-height="0in"><text:p text:style-name="P1"><text:span text:style-name="T14">Results of Running the trained Network on</text:span></text:p><text:p text:style-name="P1"><text:span text:style-name="T14">the test set (150 images).</text:span></text:p></draw:text-box></draw:frame><draw:frame draw:style-name="fr1" draw:name="Frame59" text:anchor-type="paragraph" svg:x="4.7402in" svg:y="2.7228in" svg:width="3.1752in" draw:z-index="58"><draw:text-box fo:min-height="0in"><text:p text:style-name="P1"><text:span text:style-name="T17">86% - accuracy with "Gabor GIST gray</text:span></text:p><text:p text:style-name="P1"><text:span text:style-name="T17">scale no more" features</text:span></text:p></draw:text-box></draw:frame><draw:frame draw:style-name="fr1" draw:name="Frame60" text:anchor-type="paragraph" svg:x="4.7402in" svg:y="3.4626in" svg:width="3.2882in" draw:z-index="59"><draw:text-box fo:min-height="0in"><text:p text:style-name="P1"><text:span text:style-name="T14">Forest - 100% correctly classified.</text:span></text:p><text:p text:style-name="P1"><text:span text:style-name="T14">Tall Building - 96.6% correctly classified.</text:span></text:p></draw:text-box></draw:frame></text:p>
      <text:p text:style-name="P12"><draw:frame draw:style-name="fr1" draw:name="Frame65" text:anchor-type="paragraph" svg:x="1.2835in" svg:y="3.7925in" svg:width="6.4791in" draw:z-index="64"><draw:text-box fo:min-height="0in"><text:p text:style-name="P1"><text:span text:style-name="T11">Decided to use MLP instead of RBF, as the training time wasn't an</text:span></text:p><text:p text:style-name="P1"><text:span text:style-name="T11">issue even with 300 hidden layers, and MLP has nicer</text:span></text:p><text:p text:style-name="P1"><text:span text:style-name="T11">implementation in MATLAB - easier to configure and get fancy</text:span></text:p><text:p text:style-name="P1"><text:span text:style-name="T11">plots!</text:span></text:p></draw:text-box></draw:frame><draw:frame draw:style-name="fr1" draw:name="Frame62" text:anchor-type="paragraph" svg:x="0.4902in" svg:y="0.7937in" svg:width="3.7571in" draw:z-index="61"><draw:text-box fo:min-height="0in"><text:p text:style-name="P1"><text:span text:style-name="T2">Gabor descriptor</text:span></text:p></draw:text-box></draw:frame><draw:frame draw:style-name="fr1" draw:name="Frame63" text:anchor-type="paragraph" svg:x="1.2835in" svg:y="1.8909in" svg:width="2.8972in" draw:z-index="62"><draw:text-box fo:min-height="0in"><text:p text:style-name="P1"><text:span text:style-name="T11">I'm very happy with results.</text:span></text:p></draw:text-box></draw:frame><draw:frame draw:style-name="fr1" draw:name="Frame64" text:anchor-type="paragraph" svg:x="1.2835in" svg:y="2.8417in" svg:width="6.198in" draw:z-index="63"><draw:text-box fo:min-height="0in"><text:p text:style-name="P1"><text:span text:style-name="T11">Next stage - will need to get all the features of my teammates -</text:span></text:p><text:p text:style-name="P1"><text:span text:style-name="T11">normalize and scale them,and then run through network.</text:span></text:p></draw:text-box></draw:frame></text:p>
      <text:p text:style-name="P13"><draw:frame draw:style-name="fr1" draw:name="Frame66" text:anchor-type="paragraph" svg:x="3.0807in" svg:y="2.3217in" svg:width="2.9846in" draw:z-index="65"><draw:text-box fo:min-height="0in"><text:p text:style-name="P1"><text:span text:style-name="T4"><text:s/>Pauline:</text:span></text:p><text:p text:style-name="P1"><text:span text:style-name="T6">CENTRIST</text:span></text:p><text:p text:style-name="P1"><text:span text:style-name="T6">descriptor</text:span></text:p></draw:text-box></draw:frame></text:p>
      <text:p text:style-name="P14"><draw:frame draw:style-name="fr1" draw:name="Frame80" text:anchor-type="paragraph" svg:x="4.2783in" svg:y="4.878in" svg:width="2.2043in" draw:z-index="79"><draw:text-box fo:min-height="0in"><text:p text:style-name="P1"><text:span text:style-name="T11">: low confidence (1)</text:span></text:p></draw:text-box></draw:frame><draw:frame draw:style-name="fr1" draw:name="Frame67" text:anchor-type="paragraph" svg:x="0.4902in" svg:y="0.7937in" svg:width="4.5484in" draw:z-index="66"><draw:text-box fo:min-height="0in"><text:p text:style-name="P1"><text:span text:style-name="T2">CENTRIST descriptor</text:span></text:p></draw:text-box></draw:frame><draw:frame draw:style-name="fr1" draw:name="Frame68" text:anchor-type="paragraph" svg:x="0.6783in" svg:y="1.4717in" svg:width="1.9634in" draw:z-index="67"><draw:text-box fo:min-height="0in"><text:p text:style-name="P1"><text:span text:style-name="T11">Voting algorithm:</text:span></text:p></draw:text-box></draw:frame><draw:frame draw:style-name="fr1" draw:name="Frame69" text:anchor-type="paragraph" svg:x="1.9189in" svg:y="2.1839in" svg:width="0.6882in" draw:z-index="68"><draw:text-box fo:min-height="0in"><text:p text:style-name="P1"><text:span text:style-name="T11">CT</text:span></text:p></draw:text-box></draw:frame><draw:frame draw:style-name="fr1" draw:name="Frame70" text:anchor-type="paragraph" svg:x="2.4984in" svg:y="2.4917in" svg:width="0.7165in" draw:z-index="69"><draw:text-box fo:min-height="0in"><text:p text:style-name="P1"><text:span text:style-name="T18">vote</text:span></text:p></draw:text-box></draw:frame><draw:frame draw:style-name="fr1" draw:name="Frame71" text:anchor-type="paragraph" svg:x="3.1591in" svg:y="2.1839in" svg:width="0.9874in" draw:z-index="70"><draw:text-box fo:min-height="0in"><text:p text:style-name="P1"><text:span text:style-name="T11">Gabor</text:span></text:p></draw:text-box></draw:frame><draw:frame draw:style-name="fr1" draw:name="Frame72" text:anchor-type="paragraph" svg:x="3.4752in" svg:y="2.5256in" svg:width="0.7165in" draw:z-index="71"><draw:text-box fo:min-height="0in"><text:p text:style-name="P1"><text:span text:style-name="T18">vote</text:span></text:p></draw:text-box></draw:frame><draw:frame draw:style-name="fr1" draw:name="Frame73" text:anchor-type="paragraph" svg:x="4.3992in" svg:y="2.1839in" svg:width="0.8945in" draw:z-index="72"><draw:text-box fo:min-height="0in"><text:p text:style-name="P1"><text:span text:style-name="T11">GIST</text:span></text:p></draw:text-box></draw:frame><draw:frame draw:style-name="fr1" draw:name="Frame74" text:anchor-type="paragraph" svg:x="4.3654in" svg:y="2.5835in" svg:width="0.7165in" draw:z-index="73"><draw:text-box fo:min-height="0in"><text:p text:style-name="P1"><text:span text:style-name="T18">vote</text:span></text:p></draw:text-box></draw:frame><draw:frame draw:style-name="fr1" draw:name="Frame75" text:anchor-type="paragraph" svg:x="2.0283in" svg:y="3.6437in" svg:width="0.5102in" draw:z-index="74"><draw:text-box fo:min-height="0in"><text:p text:style-name="P1"><text:span text:style-name="T14">●</text:span></text:p></draw:text-box></draw:frame><draw:frame draw:style-name="fr1" draw:name="Frame76" text:anchor-type="paragraph" svg:x="4.3992in" svg:y="3.6102in" svg:width="2.2846in" draw:z-index="75"><draw:text-box fo:min-height="0in"><text:p text:style-name="P1"><text:span text:style-name="T11">: high confidence (3)</text:span></text:p></draw:text-box></draw:frame><draw:frame draw:style-name="fr1" draw:name="Frame77" text:anchor-type="paragraph" svg:x="4.2783in" svg:y="4.1646in" svg:width="2.6291in" draw:z-index="76"><draw:text-box fo:min-height="0in"><text:p text:style-name="P1"><text:span text:style-name="T11">: medium confidence (2)</text:span></text:p></draw:text-box></draw:frame><draw:frame draw:style-name="fr1" draw:name="Frame78" text:anchor-type="paragraph" svg:x="2.0283in" svg:y="4.198in" svg:width="0.5102in" draw:z-index="77"><draw:text-box fo:min-height="0in"><text:p text:style-name="P1"><text:span text:style-name="T14">●</text:span></text:p></draw:text-box></draw:frame><draw:frame draw:style-name="fr1" draw:name="Frame79" text:anchor-type="paragraph" svg:x="2.0283in" svg:y="4.911in" svg:width="0.5102in" draw:z-index="78"><draw:text-box fo:min-height="0in"><text:p text:style-name="P1"><text:span text:style-name="T14">●</text:span></text:p></draw:text-box></draw:frame></text:p>
      <text:p text:style-name="P15"><draw:frame draw:style-name="fr1" draw:name="Frame99" text:anchor-type="paragraph" svg:x="0.8602in" svg:y="4.8264in" svg:width="1.4083in" draw:z-index="98"><draw:text-box fo:min-height="0in"><text:p text:style-name="P1"><text:span text:style-name="T15">Training</text:span></text:p><text:p text:style-name="P1"><text:span text:style-name="T15">images</text:span></text:p></draw:text-box></draw:frame><draw:frame draw:style-name="fr1" draw:name="Frame81" text:anchor-type="paragraph" svg:x="0.4902in" svg:y="0.7937in" svg:width="4.5484in" draw:z-index="80"><draw:text-box fo:min-height="0in"><text:p text:style-name="P1"><text:span text:style-name="T2">CENTRIST descriptor</text:span></text:p></draw:text-box></draw:frame><draw:frame draw:style-name="fr1" draw:name="Frame82" text:anchor-type="paragraph" svg:x="0.978in" svg:y="1.4535in" svg:width="3.3756in" draw:z-index="81"><draw:text-box fo:min-height="0in"><text:p text:style-name="P1"><text:span text:style-name="T11">Random training/testing images:</text:span></text:p></draw:text-box></draw:frame><draw:frame draw:style-name="fr1" draw:name="Frame83" text:anchor-type="paragraph" svg:x="1.6598in" svg:y="2.0425in" svg:width="0.5028in" draw:z-index="82"><draw:text-box fo:min-height="0in"><text:p text:style-name="P1"><text:span text:style-name="T14">3</text:span></text:p></draw:text-box></draw:frame><draw:frame draw:style-name="fr1" draw:name="Frame84" text:anchor-type="paragraph" svg:x="2.1862in" svg:y="2.0425in" svg:width="0.5028in" draw:z-index="83"><draw:text-box fo:min-height="0in"><text:p text:style-name="P1"><text:span text:style-name="T14">2</text:span></text:p></draw:text-box></draw:frame><draw:frame draw:style-name="fr1" draw:name="Frame85" text:anchor-type="paragraph" svg:x="2.7134in" svg:y="2.0425in" svg:width="0.5028in" draw:z-index="84"><draw:text-box fo:min-height="0in"><text:p text:style-name="P1"><text:span text:style-name="T14">6</text:span></text:p></draw:text-box></draw:frame><draw:frame draw:style-name="fr1" draw:name="Frame86" text:anchor-type="paragraph" svg:x="3.2402in" svg:y="2.0425in" svg:width="0.5028in" draw:z-index="85"><draw:text-box fo:min-height="0in"><text:p text:style-name="P1"><text:span text:style-name="T14">1</text:span></text:p></draw:text-box></draw:frame><draw:frame draw:style-name="fr1" draw:name="Frame87" text:anchor-type="paragraph" svg:x="3.7673in" svg:y="2.0425in" svg:width="0.5028in" draw:z-index="86"><draw:text-box fo:min-height="0in"><text:p text:style-name="P1"><text:span text:style-name="T14">7</text:span></text:p></draw:text-box></draw:frame><draw:frame draw:style-name="fr1" draw:name="Frame88" text:anchor-type="paragraph" svg:x="4.2945in" svg:y="2.0425in" svg:width="0.5028in" draw:z-index="87"><draw:text-box fo:min-height="0in"><text:p text:style-name="P1"><text:span text:style-name="T14">4</text:span></text:p></draw:text-box></draw:frame><draw:frame draw:style-name="fr1" draw:name="Frame89" text:anchor-type="paragraph" svg:x="4.8217in" svg:y="2.0425in" svg:width="0.5028in" draw:z-index="88"><draw:text-box fo:min-height="0in"><text:p text:style-name="P1"><text:span text:style-name="T14">5</text:span></text:p></draw:text-box></draw:frame><draw:frame draw:style-name="fr1" draw:name="Frame90" text:anchor-type="paragraph" svg:x="5.9689in" svg:y="2.372in" svg:width="0.9563in" draw:z-index="89"><draw:text-box fo:min-height="0in"><text:p text:style-name="P1"><text:span text:style-name="T15">&lt; 5?</text:span></text:p></draw:text-box></draw:frame><draw:frame draw:style-name="fr1" draw:name="Frame91" text:anchor-type="paragraph" svg:x="1.6598in" svg:y="2.7654in" svg:width="0.5028in" draw:z-index="90"><draw:text-box fo:min-height="0in"><text:p text:style-name="P1"><text:span text:style-name="T14">1</text:span></text:p></draw:text-box></draw:frame><draw:frame draw:style-name="fr1" draw:name="Frame92" text:anchor-type="paragraph" svg:x="2.1862in" svg:y="2.7654in" svg:width="0.5028in" draw:z-index="91"><draw:text-box fo:min-height="0in"><text:p text:style-name="P1"><text:span text:style-name="T14">1</text:span></text:p></draw:text-box></draw:frame><draw:frame draw:style-name="fr1" draw:name="Frame93" text:anchor-type="paragraph" svg:x="2.7134in" svg:y="2.7654in" svg:width="0.5028in" draw:z-index="92"><draw:text-box fo:min-height="0in"><text:p text:style-name="P1"><text:span text:style-name="T14">0</text:span></text:p></draw:text-box></draw:frame><draw:frame draw:style-name="fr1" draw:name="Frame94" text:anchor-type="paragraph" svg:x="3.2402in" svg:y="2.7654in" svg:width="0.5028in" draw:z-index="93"><draw:text-box fo:min-height="0in"><text:p text:style-name="P1"><text:span text:style-name="T14">1</text:span></text:p></draw:text-box></draw:frame><draw:frame draw:style-name="fr1" draw:name="Frame95" text:anchor-type="paragraph" svg:x="3.7673in" svg:y="2.7654in" svg:width="0.5028in" draw:z-index="94"><draw:text-box fo:min-height="0in"><text:p text:style-name="P1"><text:span text:style-name="T14">1</text:span></text:p></draw:text-box></draw:frame><draw:frame draw:style-name="fr1" draw:name="Frame96" text:anchor-type="paragraph" svg:x="4.2945in" svg:y="2.7654in" svg:width="0.5028in" draw:z-index="95"><draw:text-box fo:min-height="0in"><text:p text:style-name="P1"><text:span text:style-name="T14">1</text:span></text:p></draw:text-box></draw:frame><draw:frame draw:style-name="fr1" draw:name="Frame97" text:anchor-type="paragraph" svg:x="4.8217in" svg:y="2.7654in" svg:width="0.5028in" draw:z-index="96"><draw:text-box fo:min-height="0in"><text:p text:style-name="P1"><text:span text:style-name="T14">0</text:span></text:p></draw:text-box></draw:frame><draw:frame draw:style-name="fr1" draw:name="Frame98" text:anchor-type="paragraph" svg:x="4.8126in" svg:y="4.1909in" svg:width="2.2807in" draw:z-index="97"><draw:text-box fo:min-height="0in"><text:p text:style-name="P1"><text:span text:style-name="T15">Testing images</text:span></text:p></draw:text-box></draw:frame></text:p>
      <text:p text:style-name="P16"><draw:frame draw:style-name="fr1" draw:name="Frame109" text:anchor-type="paragraph" svg:x="1.798in" svg:y="4.3071in" svg:width="1.6272in" draw:z-index="108"><draw:text-box fo:min-height="0in"><text:p text:style-name="P1"><text:span text:style-name="T14">coast06</text:span></text:p><text:p text:style-name="P1"><text:span text:style-name="T14">forest:11</text:span></text:p><text:p text:style-name="P1"><text:span text:style-name="T14">mountain:04</text:span></text:p><text:p text:style-name="P1"><text:span text:style-name="T14">highway:07</text:span></text:p><text:p text:style-name="P1"><text:span text:style-name="T14">tall building: 09</text:span></text:p></draw:text-box></draw:frame><draw:frame draw:style-name="fr1" draw:name="Frame100" text:anchor-type="paragraph" svg:x="0.4902in" svg:y="0.7937in" svg:width="4.5484in" draw:z-index="99"><draw:text-box fo:min-height="0in"><text:p text:style-name="P1"><text:span text:style-name="T2">CENTRIST descriptor</text:span></text:p></draw:text-box></draw:frame><draw:frame draw:style-name="fr1" draw:name="Frame101" text:anchor-type="paragraph" svg:x="1.7091in" svg:y="1.6646in" svg:width="3.9091in" draw:z-index="100"><draw:text-box fo:min-height="0in"><text:p text:style-name="P1"><text:span text:style-name="T14">Total number of misclassifications: 80/100 = 80%</text:span></text:p></draw:text-box></draw:frame><draw:frame draw:style-name="fr1" draw:name="Frame102" text:anchor-type="paragraph" svg:x="1.7091in" svg:y="1.9417in" svg:width="0.8681in" draw:z-index="101"><draw:text-box fo:min-height="0in"><text:p text:style-name="P1"><text:span text:style-name="T14">Detail:</text:span></text:p></draw:text-box></draw:frame><draw:frame draw:style-name="fr1" draw:name="Frame103" text:anchor-type="paragraph" svg:x="2.3866in" svg:y="1.9417in" svg:width="1.628in" draw:z-index="102"><draw:text-box fo:min-height="0in"><text:p text:style-name="P1"><text:span text:style-name="T14">Number of errors</text:span></text:p></draw:text-box></draw:frame><draw:frame draw:style-name="fr1" draw:name="Frame104" text:anchor-type="paragraph" svg:x="2.761in" svg:y="2.2189in" svg:width="0.6193in" draw:z-index="103"><draw:text-box fo:min-height="0in"><text:p text:style-name="P1"><text:span text:style-name="T14">15</text:span></text:p><text:p text:style-name="P1"><text:span text:style-name="T14">23</text:span></text:p><text:p text:style-name="P1"><text:span text:style-name="T14">10</text:span></text:p><text:p text:style-name="P1"><text:span text:style-name="T14">16</text:span></text:p><text:p text:style-name="P1"><text:span text:style-name="T14">16</text:span></text:p></draw:text-box></draw:frame><draw:frame draw:style-name="fr1" draw:name="Frame105" text:anchor-type="paragraph" svg:x="1.798in" svg:y="2.2189in" svg:width="1.261in" draw:z-index="104"><draw:text-box fo:min-height="0in"><text:p text:style-name="P1"><text:span text:style-name="T14">coast</text:span></text:p><text:p text:style-name="P1"><text:span text:style-name="T14">forest:</text:span></text:p><text:p text:style-name="P1"><text:span text:style-name="T14">mountain:</text:span></text:p><text:p text:style-name="P1"><text:span text:style-name="T14">highway:</text:span></text:p><text:p text:style-name="P1"><text:span text:style-name="T14">tall building:</text:span></text:p></draw:text-box></draw:frame><draw:frame draw:style-name="fr1" draw:name="Frame106" text:anchor-type="paragraph" svg:x="1.7091in" svg:y="3.7528in" svg:width="3.8193in" draw:z-index="105"><draw:text-box fo:min-height="0in"><text:p text:style-name="P1"><text:span text:style-name="T14">Total number of misclassifications: 37/50 = 74%</text:span></text:p></draw:text-box></draw:frame><draw:frame draw:style-name="fr1" draw:name="Frame107" text:anchor-type="paragraph" svg:x="1.7091in" svg:y="4.0299in" svg:width="0.8681in" draw:z-index="106"><draw:text-box fo:min-height="0in"><text:p text:style-name="P1"><text:span text:style-name="T14">Detail:</text:span></text:p></draw:text-box></draw:frame><draw:frame draw:style-name="fr1" draw:name="Frame108" text:anchor-type="paragraph" svg:x="2.3866in" svg:y="4.0299in" svg:width="1.628in" draw:z-index="107"><draw:text-box fo:min-height="0in"><text:p text:style-name="P1"><text:span text:style-name="T14">Number of errors</text:span></text:p></draw:text-box></draw:frame></text:p>
      <text:p text:style-name="P17"><draw:frame draw:style-name="fr1" draw:name="Frame114" text:anchor-type="paragraph" svg:x="1.4571in" svg:y="2.5429in" svg:width="2.2602in" draw:z-index="113"><draw:text-box fo:min-height="0in"><text:p text:style-name="P1"><text:span text:style-name="T11">coast00/02</text:span></text:p><text:p text:style-name="P1"><text:span text:style-name="T11">forest:34/43</text:span></text:p><text:p text:style-name="P1"><text:span text:style-name="T11">mountain:02/03</text:span></text:p><text:p text:style-name="P1"><text:span text:style-name="T11">highway:08/09</text:span></text:p><text:p text:style-name="P1"><text:span text:style-name="T11">tall building: 14/18</text:span></text:p></draw:text-box></draw:frame><draw:frame draw:style-name="fr1" draw:name="Frame110" text:anchor-type="paragraph" svg:x="0.4902in" svg:y="0.7937in" svg:width="4.5484in" draw:z-index="109"><draw:text-box fo:min-height="0in"><text:p text:style-name="P1"><text:span text:style-name="T2">CENTRIST descriptor</text:span></text:p></draw:text-box></draw:frame><draw:frame draw:style-name="fr1" draw:name="Frame111" text:anchor-type="paragraph" svg:x="1.3425in" svg:y="1.7508in" svg:width="4.7929in" draw:z-index="110"><draw:text-box fo:min-height="0in"><text:p text:style-name="P1"><text:span text:style-name="T11">Total number of misclassifications: 58/75 = 77%</text:span></text:p></draw:text-box></draw:frame><draw:frame draw:style-name="fr1" draw:name="Frame112" text:anchor-type="paragraph" svg:x="1.3425in" svg:y="2.2256in" svg:width="0.9984in" draw:z-index="111"><draw:text-box fo:min-height="0in"><text:p text:style-name="P1"><text:span text:style-name="T11">Detail:</text:span></text:p></draw:text-box></draw:frame><draw:frame draw:style-name="fr1" draw:name="Frame113" text:anchor-type="paragraph" svg:x="2.2138in" svg:y="2.2256in" svg:width="1.9744in" draw:z-index="112"><draw:text-box fo:min-height="0in"><text:p text:style-name="P1"><text:span text:style-name="T11">Number of errors</text:span></text:p></draw:text-box></draw:frame></text:p>
      <text:p text:style-name="P18"><draw:frame draw:style-name="fr1" draw:name="Frame120" text:anchor-type="paragraph" svg:x="3.5154in" svg:y="2.4366in" svg:width="0.8598in" draw:z-index="119"><draw:text-box fo:min-height="0in"><text:p text:style-name="P1"><text:span text:style-name="T14">Gabor</text:span></text:p></draw:text-box></draw:frame><draw:frame draw:style-name="fr1" draw:name="Frame115" text:anchor-type="paragraph" svg:x="0.4902in" svg:y="0.7937in" svg:width="4.5484in" draw:z-index="114"><draw:text-box fo:min-height="0in"><text:p text:style-name="P1"><text:span text:style-name="T2">CENTRIST descriptor</text:span></text:p></draw:text-box></draw:frame><draw:frame draw:style-name="fr1" draw:name="Frame116" text:anchor-type="paragraph" svg:x="0.5244in" svg:y="1.3957in" svg:width="2.6854in" draw:z-index="115"><draw:text-box fo:min-height="0in"><text:p text:style-name="P1"><text:span text:style-name="T11">If 3 disagree, priority to...</text:span></text:p></draw:text-box></draw:frame><draw:frame draw:style-name="fr1" draw:name="Frame117" text:anchor-type="paragraph" svg:x="3.1118in" svg:y="1.7602in" svg:width="1.2161in" draw:z-index="116"><draw:text-box fo:min-height="0in"><text:p text:style-name="P1"><text:span text:style-name="T14">CENTRIST</text:span></text:p></draw:text-box></draw:frame><draw:frame draw:style-name="fr1" draw:name="Frame118" text:anchor-type="paragraph" svg:x="0.722in" svg:y="2.0866in" svg:width="1.1992in" draw:z-index="117"><draw:text-box fo:min-height="0in"><text:p text:style-name="P1"><text:span text:style-name="T14">70% errors</text:span></text:p></draw:text-box></draw:frame><draw:frame draw:style-name="fr1" draw:name="Frame119" text:anchor-type="paragraph" svg:x="2.1626in" svg:y="2.2374in" svg:width="0.7874in" draw:z-index="118"><draw:text-box fo:min-height="0in"><text:p text:style-name="P1"><text:span text:style-name="T14">GIST</text:span></text:p></draw:text-box></draw:frame></text:p>
      <text:p text:style-name="P19"><draw:frame draw:style-name="fr1" draw:name="Frame126" text:anchor-type="paragraph" svg:x="3.1709in" svg:y="2.5744in" svg:width="0.8598in" draw:z-index="125"><draw:text-box fo:min-height="0in"><text:p text:style-name="P1"><text:span text:style-name="T14">Gabor</text:span></text:p></draw:text-box></draw:frame><draw:frame draw:style-name="fr1" draw:name="Frame121" text:anchor-type="paragraph" svg:x="0.4902in" svg:y="0.7937in" svg:width="4.5484in" draw:z-index="120"><draw:text-box fo:min-height="0in"><text:p text:style-name="P1"><text:span text:style-name="T2">CENTRIST descriptor</text:span></text:p></draw:text-box></draw:frame><draw:frame draw:style-name="fr1" draw:name="Frame122" text:anchor-type="paragraph" svg:x="0.6673in" svg:y="1.3791in" svg:width="3.3409in" draw:z-index="121"><draw:text-box fo:min-height="0in"><text:p text:style-name="P1"><text:span text:style-name="T11">Oh! Let's try to order feature</text:span></text:p><text:p text:style-name="P1"><text:span text:style-name="T11">vectors and image names in the</text:span></text:p><text:p text:style-name="P1"><text:span text:style-name="T11">same order...!</text:span></text:p></draw:text-box></draw:frame><draw:frame draw:style-name="fr1" draw:name="Frame123" text:anchor-type="paragraph" svg:x="3.1118in" svg:y="2.1736in" svg:width="1.2161in" draw:z-index="122"><draw:text-box fo:min-height="0in"><text:p text:style-name="P1"><text:span text:style-name="T14">CENTRIST</text:span></text:p></draw:text-box></draw:frame><draw:frame draw:style-name="fr1" draw:name="Frame124" text:anchor-type="paragraph" svg:x="0.9in" svg:y="2.3429in" svg:width="1.1992in" draw:z-index="123"><draw:text-box fo:min-height="0in"><text:p text:style-name="P1"><text:span text:style-name="T14">50% errors</text:span></text:p></draw:text-box></draw:frame><draw:frame draw:style-name="fr1" draw:name="Frame125" text:anchor-type="paragraph" svg:x="2.1626in" svg:y="2.6508in" svg:width="0.7874in" draw:z-index="124"><draw:text-box fo:min-height="0in"><text:p text:style-name="P1"><text:span text:style-name="T14">GIST</text:span></text:p></draw:text-box></draw:frame></text:p>
      <text:p text:style-name="P20"><draw:frame draw:style-name="fr1" draw:name="Frame134" text:anchor-type="paragraph" svg:x="1.0866in" svg:y="4.8043in" svg:width="6.1425in" draw:z-index="133"><draw:text-box fo:min-height="0in"><text:p text:style-name="P1"><text:span text:style-name="T11">Default category decided by CT features if 3 methods disagree</text:span></text:p></draw:text-box></draw:frame><draw:frame draw:style-name="fr1" draw:name="Frame127" text:anchor-type="paragraph" svg:x="0.4902in" svg:y="0.7937in" svg:width="4.5484in" draw:z-index="126"><draw:text-box fo:min-height="0in"><text:p text:style-name="P1"><text:span text:style-name="T2">CENTRIST descriptor</text:span></text:p></draw:text-box></draw:frame><draw:frame draw:style-name="fr1" draw:name="Frame128" text:anchor-type="paragraph" svg:x="1.0866in" svg:y="1.5957in" svg:width="3.3984in" draw:z-index="127"><draw:text-box fo:min-height="0in"><text:p text:style-name="P1"><text:span text:style-name="T11">Performance so far: around 55%</text:span></text:p></draw:text-box></draw:frame><draw:frame draw:style-name="fr1" draw:name="Frame129" text:anchor-type="paragraph" svg:x="1.1965in" svg:y="2.3425in" svg:width="0.5102in" draw:z-index="128"><draw:text-box fo:min-height="0in"><text:p text:style-name="P1"><text:span text:style-name="T14">●</text:span></text:p></draw:text-box></draw:frame><draw:frame draw:style-name="fr1" draw:name="Frame130" text:anchor-type="paragraph" svg:x="1.5008in" svg:y="2.3091in" svg:width="2.4437in" draw:z-index="129"><draw:text-box fo:min-height="0in"><text:p text:style-name="P1"><text:span text:style-name="T11">GIST and CENTRIST:</text:span></text:p></draw:text-box></draw:frame><draw:frame draw:style-name="fr1" draw:name="Frame131" text:anchor-type="paragraph" svg:x="1.5008in" svg:y="2.6654in" svg:width="2.4339in" draw:z-index="130"><draw:text-box fo:min-height="0in"><text:p text:style-name="P1"><text:span text:style-name="T11">histogram intersection</text:span></text:p></draw:text-box></draw:frame><draw:frame draw:style-name="fr1" draw:name="Frame132" text:anchor-type="paragraph" svg:x="1.1965in" svg:y="3.0555in" svg:width="0.5102in" draw:z-index="131"><draw:text-box fo:min-height="0in"><text:p text:style-name="P1"><text:span text:style-name="T14">●</text:span></text:p></draw:text-box></draw:frame><draw:frame draw:style-name="fr1" draw:name="Frame133" text:anchor-type="paragraph" svg:x="1.5008in" svg:y="3.022in" svg:width="2.9382in" draw:z-index="132"><draw:text-box fo:min-height="0in"><text:p text:style-name="P1"><text:span text:style-name="T11">GABOR: Euclidian distance</text:span></text:p></draw:text-box></draw:frame></text:p>
      <text:p text:style-name="P21"><draw:frame draw:style-name="fr1" draw:name="Frame138" text:anchor-type="paragraph" svg:x="6.4811in" svg:y="4.5382in" svg:width="1.5654in" draw:z-index="137"><draw:text-box fo:min-height="0in"><text:p text:style-name="P1"><text:span text:style-name="T14">High confidence</text:span></text:p></draw:text-box></draw:frame><draw:frame draw:style-name="fr1" draw:name="Frame135" text:anchor-type="paragraph" svg:x="0.4902in" svg:y="0.7937in" svg:width="4.5484in" draw:z-index="134"><draw:text-box fo:min-height="0in"><text:p text:style-name="P1"><text:span text:style-name="T2">CENTRIST descriptor</text:span></text:p></draw:text-box></draw:frame><draw:frame draw:style-name="fr1" draw:name="Frame136" text:anchor-type="paragraph" svg:x="6.2043in" svg:y="1.0417in" svg:width="1.998in" draw:z-index="135"><draw:text-box fo:min-height="0in"><text:p text:style-name="P1"><text:span text:style-name="T14">Confidence = arbitrary</text:span></text:p><text:p text:style-name="P1"><text:span text:style-name="T14">number</text:span></text:p></draw:text-box></draw:frame><draw:frame draw:style-name="fr1" draw:name="Frame137" text:anchor-type="paragraph" svg:x="6.4811in" svg:y="3.6146in" svg:width="1.7528in" draw:z-index="136"><draw:text-box fo:min-height="0in"><text:p text:style-name="P1"><text:span text:style-name="T14">Good performance</text:span></text:p></draw:text-box></draw:frame></text:p>
      <text:p text:style-name="P22"><draw:frame draw:style-name="fr1" draw:name="Frame139" text:anchor-type="paragraph" svg:x="2.2311in" svg:y="2.3201in" svg:width="4.4362in" draw:z-index="138"><draw:text-box fo:min-height="0in"><text:p text:style-name="P1"><text:span text:style-name="T4"><text:s text:c="6"/>Piter:</text:span></text:p><text:p text:style-name="P1"><text:span text:style-name="T6">Color histogram</text:span></text:p><text:p text:style-name="P1"><text:span text:style-name="T6"><text:s text:c="3"/>descriptor</text:span></text:p></draw:text-box></draw:frame></text:p>
      <text:p text:style-name="P23"><draw:frame draw:style-name="fr1" draw:name="Frame146" text:anchor-type="paragraph" svg:x="0.9957in" svg:y="5.1898in" svg:width="2.1217in" draw:z-index="145"><draw:text-box fo:min-height="0in"><text:p text:style-name="P1"><text:span text:style-name="T16">Implement SVM</text:span></text:p></draw:text-box></draw:frame><draw:frame draw:style-name="fr1" draw:name="Frame140" text:anchor-type="paragraph" svg:x="0.4445in" svg:y="0.2591in" svg:width="2.8575in" draw:z-index="139"><draw:text-box fo:min-height="0in"><text:p text:style-name="P1"><text:span text:style-name="T7">On The List :</text:span></text:p></draw:text-box></draw:frame><draw:frame draw:style-name="fr1" draw:name="Frame141" text:anchor-type="paragraph" svg:x="0.9957in" svg:y="1.0909in" svg:width="7.3154in" draw:z-index="140"><draw:text-box fo:min-height="0in"><text:p text:style-name="P1"><text:span text:style-name="T16">Feature Extraction</text:span></text:p><text:p text:style-name="P1"><text:span text:style-name="T16">- Individually, combine and average color histograms for each class</text:span></text:p></draw:text-box></draw:frame><draw:frame draw:style-name="fr1" draw:name="Frame142" text:anchor-type="paragraph" svg:x="0.9957in" svg:y="1.911in" svg:width="7.0972in" draw:z-index="141"><draw:text-box fo:min-height="0in"><text:p text:style-name="P1"><text:span text:style-name="T16">Create a Set for Comparison Purpose</text:span></text:p><text:p text:style-name="P1"><text:span text:style-name="T16">- Create a list of category of the average histograms of each class</text:span></text:p></draw:text-box></draw:frame><draw:frame draw:style-name="fr1" draw:name="Frame143" text:anchor-type="paragraph" svg:x="0.9957in" svg:y="2.7307in" svg:width="4.4827in" draw:z-index="142"><draw:text-box fo:min-height="0in"><text:p text:style-name="P1"><text:span text:style-name="T16">Class feature comparison</text:span></text:p><text:p text:style-name="P1"><text:span text:style-name="T16">- Individually Test and Compare classes</text:span></text:p></draw:text-box></draw:frame><draw:frame draw:style-name="fr1" draw:name="Frame144" text:anchor-type="paragraph" svg:x="0.9957in" svg:y="3.5508in" svg:width="4.0866in" draw:z-index="143"><draw:text-box fo:min-height="0in"><text:p text:style-name="P1"><text:span text:style-name="T16">Classification Comparison</text:span></text:p><text:p text:style-name="P1"><text:span text:style-name="T16">- Test and Compare all classes data</text:span></text:p></draw:text-box></draw:frame><draw:frame draw:style-name="fr1" draw:name="Frame145" text:anchor-type="paragraph" svg:x="0.9957in" svg:y="4.3701in" svg:width="5.839in" draw:z-index="144"><draw:text-box fo:min-height="0in"><text:p text:style-name="P1"><text:span text:style-name="T16">Average Intersection &amp; Features Implementation</text:span></text:p><text:p text:style-name="P1"><text:span text:style-name="T16">- Check for intersecting features among classes</text:span></text:p></draw:text-box></draw:frame></text:p>
      <text:p text:style-name="P24"><draw:frame draw:style-name="fr1" draw:name="Frame153" text:anchor-type="paragraph" svg:x="0.6146in" svg:y="3.8638in" svg:width="7.8465in" draw:z-index="152"><draw:text-box fo:min-height="0in"><text:p text:style-name="P1"><text:span text:style-name="T15">These methods or color spaces provide this descriptor with</text:span></text:p><text:p text:style-name="P1"><text:span text:style-name="T15">relevant information for classification purpose. The following test</text:span></text:p><text:p text:style-name="P1"><text:span text:style-name="T15">results will show the number of mis-classifications of each method</text:span></text:p><text:p text:style-name="P1"><text:span text:style-name="T15">with a 4 x 30 matrix of test images.</text:span></text:p></draw:text-box></draw:frame><draw:frame draw:style-name="fr1" draw:name="Frame147" text:anchor-type="paragraph" svg:x="2.3075in" svg:y="0.4209in" svg:width="3.7736in" draw:z-index="146"><draw:text-box fo:min-height="0in"><text:p text:style-name="P1"><text:span text:style-name="T7">Feature Extraction</text:span></text:p></draw:text-box></draw:frame><draw:frame draw:style-name="fr1" draw:name="Frame148" text:anchor-type="paragraph" svg:x="0.6146in" svg:y="0.8665in" svg:width="7.8457in" draw:z-index="147"><draw:text-box fo:min-height="0in"><text:p text:style-name="P1"><text:span text:style-name="T15">The Models, used for representing colors numerically, are as</text:span></text:p><text:p text:style-name="P1"><text:span text:style-name="T15">follow:</text:span></text:p></draw:text-box></draw:frame><draw:frame draw:style-name="fr1" draw:name="Frame149" text:anchor-type="paragraph" svg:x="0.6146in" svg:y="1.6898in" svg:width="1.3772in" draw:z-index="148"><draw:text-box fo:min-height="0in"><text:p text:style-name="P1"><text:span text:style-name="T15">1 - RGB</text:span></text:p></draw:text-box></draw:frame><draw:frame draw:style-name="fr1" draw:name="Frame150" text:anchor-type="paragraph" svg:x="0.6146in" svg:y="2.1654in" svg:width="1.3465in" draw:z-index="149"><draw:text-box fo:min-height="0in"><text:p text:style-name="P1"><text:span text:style-name="T15">2 - LAB</text:span></text:p></draw:text-box></draw:frame><draw:frame draw:style-name="fr1" draw:name="Frame151" text:anchor-type="paragraph" svg:x="0.6146in" svg:y="2.6402in" svg:width="1.3465in" draw:z-index="150"><draw:text-box fo:min-height="0in"><text:p text:style-name="P1"><text:span text:style-name="T15">3 - HSV</text:span></text:p></draw:text-box></draw:frame><draw:frame draw:style-name="fr1" draw:name="Frame152" text:anchor-type="paragraph" svg:x="0.6146in" svg:y="3.1161in" svg:width="1.6528in" draw:z-index="151"><draw:text-box fo:min-height="0in"><text:p text:style-name="P1"><text:span text:style-name="T15">4 - YCrCb</text:span></text:p></draw:text-box></draw:frame></text:p>
      <text:p text:style-name="P25"><draw:frame draw:style-name="fr2" text:anchor-type="char" svg:x="0in" svg:y="0in" svg:width="10.4165in" svg:height="7.8126in" draw:z-index="153"><draw:image xlink:href="Pictures/10000000000003E8000002EEB1CA310A.jpg" xlink:type="simple" xlink:show="embed" xlink:actuate="onLoad"/></draw:frame></text:p>
      <text:p text:style-name="P26"><draw:frame draw:style-name="fr2" text:anchor-type="char" svg:x="0in" svg:y="0in" svg:width="10.4165in" svg:height="7.8126in" draw:z-index="154"><draw:image xlink:href="Pictures/10000000000003E8000002EE4AD8032C.jpg" xlink:type="simple" xlink:show="embed" xlink:actuate="onLoad"/></draw:frame></text:p>
      <text:p text:style-name="P27"><draw:frame draw:style-name="fr2" text:anchor-type="char" svg:x="0in" svg:y="0in" svg:width="10.4165in" svg:height="7.8126in" draw:z-index="155"><draw:image xlink:href="Pictures/10000000000003E8000002EE5296DEAA.jpg" xlink:type="simple" xlink:show="embed" xlink:actuate="onLoad"/></draw:frame></text:p>
      <text:p text:style-name="P28"><draw:frame draw:style-name="fr2" text:anchor-type="char" svg:x="0in" svg:y="0in" svg:width="10.4165in" svg:height="7.8126in" draw:z-index="156"><draw:image xlink:href="Pictures/10000000000003E8000002EE2EB22E5B.jpg" xlink:type="simple" xlink:show="embed" xlink:actuate="onLoad"/></draw:frame></text:p>
      <text:p text:style-name="P29"><draw:frame draw:style-name="fr1" draw:name="Frame154" text:anchor-type="paragraph" svg:x="0.3654in" svg:y="0.4354in" svg:width="7.6161in" draw:z-index="157"><draw:text-box fo:min-height="0in"><text:p text:style-name="P1"><text:span text:style-name="T8">Creating Set &amp; Comparing Classes</text:span></text:p></draw:text-box></draw:frame></text:p>
      <text:p text:style-name="P30"><draw:frame draw:style-name="fr2" text:anchor-type="char" svg:x="0in" svg:y="0in" svg:width="10.4165in" svg:height="7.8126in" draw:z-index="158"><draw:image xlink:href="Pictures/10000000000003E8000002EE4B4B6FBA.jpg" xlink:type="simple" xlink:show="embed" xlink:actuate="onLoad"/></draw:frame></text:p>
      <text:p text:style-name="P31"><draw:frame draw:style-name="fr2" text:anchor-type="char" svg:x="0in" svg:y="0in" svg:width="10.4165in" svg:height="7.8126in" draw:z-index="159"><draw:image xlink:href="Pictures/10000000000003E8000002EED00697B7.jpg" xlink:type="simple" xlink:show="embed" xlink:actuate="onLoad"/></draw:frame></text:p>
      <text:p text:style-name="P32"><draw:frame draw:style-name="fr1" draw:name="Frame155" text:anchor-type="paragraph" svg:x="0.3925in" svg:y="0.4063in" svg:width="7.8126in" draw:z-index="160"><draw:text-box fo:min-height="0in"><text:p text:style-name="P1"><text:span text:style-name="T9">Average Intersection &amp; Features Implementation</text:span></text:p></draw:text-box></draw:frame></text:p>
      <text:p text:style-name="P33"><draw:frame draw:style-name="fr2" text:anchor-type="char" svg:x="0in" svg:y="0in" svg:width="10.4165in" svg:height="7.8126in" draw:z-index="161"><draw:image xlink:href="Pictures/10000000000003E8000002EE5CBA08BC.jpg" xlink:type="simple" xlink:show="embed" xlink:actuate="onLoad"/></draw:frame></text:p>
      <text:p text:style-name="P34"><draw:frame draw:style-name="fr2" text:anchor-type="char" svg:x="0in" svg:y="0in" svg:width="10.4165in" svg:height="7.8126in" draw:z-index="162"><draw:image xlink:href="Pictures/10000000000003E8000002EE8BB60C7C.jpg" xlink:type="simple" xlink:show="embed" xlink:actuate="onLoad"/></draw:frame></text:p>
      <text:p text:style-name="P35"><draw:frame draw:style-name="fr1" draw:name="Frame156" text:anchor-type="paragraph" svg:x="0.6516in" svg:y="0.4402in" svg:width="3.9063in" draw:z-index="163"><draw:text-box fo:min-height="0in"><text:p text:style-name="P1"><text:span text:style-name="T10">FINISHING UP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나눔고딕코딩" svg:font-family="나눔고딕코딩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나눔고딕코딩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나눔고딕코딩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6.2008in" style:num-format="1" style:print-orientation="portrait" fo:margin="0in" fo:margin-top="0in" fo:margin-bottom="0in" fo:margin-left="0in" fo:margin-right="0in" style:writing-mode="lr-tb" style:layout-grid-color="#c0c0c0" style:layout-grid-lines="1575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  <style:master-page style:name="Converted3" style:page-layout-name="Mpm1"/>
    <style:master-page style:name="Converted4" style:page-layout-name="Mpm1"/>
    <style:master-page style:name="Converted5" style:page-layout-name="Mpm1"/>
    <style:master-page style:name="Converted6" style:page-layout-name="Mpm1"/>
    <style:master-page style:name="Converted7" style:page-layout-name="Mpm1"/>
    <style:master-page style:name="Converted8" style:page-layout-name="Mpm1"/>
    <style:master-page style:name="Converted9" style:page-layout-name="Mpm1"/>
    <style:master-page style:name="Converted10" style:page-layout-name="Mpm1"/>
    <style:master-page style:name="Converted11" style:page-layout-name="Mpm1"/>
    <style:master-page style:name="Converted12" style:page-layout-name="Mpm1"/>
    <style:master-page style:name="Converted13" style:page-layout-name="Mpm1"/>
    <style:master-page style:name="Converted14" style:page-layout-name="Mpm1"/>
    <style:master-page style:name="Converted15" style:page-layout-name="Mpm1"/>
    <style:master-page style:name="Converted16" style:page-layout-name="Mpm1"/>
    <style:master-page style:name="Converted17" style:page-layout-name="Mpm1"/>
    <style:master-page style:name="Converted18" style:page-layout-name="Mpm1"/>
    <style:master-page style:name="Converted19" style:page-layout-name="Mpm1"/>
    <style:master-page style:name="Converted20" style:page-layout-name="Mpm1"/>
    <style:master-page style:name="Converted21" style:page-layout-name="Mpm1"/>
    <style:master-page style:name="Converted22" style:page-layout-name="Mpm1"/>
    <style:master-page style:name="Converted23" style:page-layout-name="Mpm1"/>
    <style:master-page style:name="Converted24" style:page-layout-name="Mpm1"/>
    <style:master-page style:name="Converted25" style:page-layout-name="Mpm1"/>
    <style:master-page style:name="Converted26" style:page-layout-name="Mpm1"/>
    <style:master-page style:name="Converted27" style:page-layout-name="Mpm1"/>
    <style:master-page style:name="Converted28" style:page-layout-name="Mpm1"/>
    <style:master-page style:name="Converted29" style:page-layout-name="Mpm1"/>
    <style:master-page style:name="Converted30" style:page-layout-name="Mpm1"/>
    <style:master-page style:name="Converted31" style:page-layout-name="Mpm1"/>
    <style:master-page style:name="Converted32" style:page-layout-name="Mpm1"/>
    <style:master-page style:name="Converted33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yPDF</meta:initial-creator>
    <meta:document-statistic meta:table-count="0" meta:image-count="8" meta:object-count="0" meta:page-count="34" meta:paragraph-count="212" meta:word-count="720" meta:character-count="4329" meta:non-whitespace-character-count="3799"/>
    <meta:generator>LibreOffice/3.6$Linux_X86_64 LibreOffice_project/2ef5aff-a6fb0ff-166bdff-cf087ad-0f1389</meta:generator>
    <meta:user-defined meta:name="Company">VeryPDF.com Inc</meta:user-defined>
  </office:meta>
</office:document-meta>
</file>